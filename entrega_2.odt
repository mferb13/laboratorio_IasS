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0C5546D661F.png" manifest:media-type="image/png"/>
  <manifest:file-entry manifest:full-path="Pictures/100000010000037800000051B7AC4867.png" manifest:media-type="image/png"/>
  <manifest:file-entry manifest:full-path="Pictures/100000010000038E000001488EDFC777.png" manifest:media-type="image/png"/>
  <manifest:file-entry manifest:full-path="Pictures/100000010000038E000001489238327B.png" manifest:media-type="image/png"/>
  <manifest:file-entry manifest:full-path="Pictures/10000001000003770000013B6F237988.png" manifest:media-type="image/png"/>
  <manifest:file-entry manifest:full-path="Pictures/1000000100000389000000D386BCAF19.png" manifest:media-type="image/png"/>
  <manifest:file-entry manifest:full-path="Pictures/100000010000037C000000356465D64D.png" manifest:media-type="image/png"/>
  <manifest:file-entry manifest:full-path="Pictures/1000000100000384000000918B4FD89C.png" manifest:media-type="image/png"/>
  <manifest:file-entry manifest:full-path="Pictures/100000010000037D000002AD6D584F8A.png" manifest:media-type="image/png"/>
  <manifest:file-entry manifest:full-path="Pictures/100000010000038C0000030CE62E197B.png" manifest:media-type="image/png"/>
  <manifest:file-entry manifest:full-path="Pictures/100000010000038E00000148FE8C5147.png" manifest:media-type="image/png"/>
  <manifest:file-entry manifest:full-path="Pictures/10000001000003840000006517472B2E.png" manifest:media-type="image/png"/>
  <manifest:file-entry manifest:full-path="Pictures/1000000100000391000000A8E9BC258F.png" manifest:media-type="image/png"/>
  <manifest:file-entry manifest:full-path="Pictures/1000000100000390000000E45379E88B.png" manifest:media-type="image/png"/>
  <manifest:file-entry manifest:full-path="Pictures/100000010000038C0000012DB2A4AB0F.png" manifest:media-type="image/png"/>
  <manifest:file-entry manifest:full-path="Pictures/1000000100000381000002DFBCC1F312.png" manifest:media-type="image/png"/>
  <manifest:file-entry manifest:full-path="Pictures/1000000100000377000000F59D875FEA.png" manifest:media-type="image/png"/>
  <manifest:file-entry manifest:full-path="Pictures/1000000100000378000000D34345A70C.png" manifest:media-type="image/png"/>
  <manifest:file-entry manifest:full-path="Pictures/100000010000038C000002E52B78C39F.png" manifest:media-type="image/png"/>
  <manifest:file-entry manifest:full-path="Pictures/10000001000003870000031421372E1D.png" manifest:media-type="image/png"/>
  <manifest:file-entry manifest:full-path="Pictures/100000010000038F000000499D5F71B2.png" manifest:media-type="image/png"/>
  <manifest:file-entry manifest:full-path="Pictures/10000001000003840000016BEF4EC68C.png" manifest:media-type="image/png"/>
  <manifest:file-entry manifest:full-path="Pictures/1000000100000394000001AAE62A2C18.png" manifest:media-type="image/png"/>
  <manifest:file-entry manifest:full-path="Pictures/1000000100000780000004B01AE21033.png" manifest:media-type="image/png"/>
  <manifest:file-entry manifest:full-path="Pictures/10000001000003B600000032B4B650D9.png" manifest:media-type="image/png"/>
  <manifest:file-entry manifest:full-path="Pictures/100000010000038E00000094EC46B93C.png" manifest:media-type="image/png"/>
  <manifest:file-entry manifest:full-path="Pictures/1000000100000391000000A837C148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125" officeooo:paragraph-rsid="00159125"/>
    </style:style>
    <style:style style:name="P2" style:family="paragraph" style:parent-style-name="Text_20_body">
      <style:text-properties officeooo:rsid="00159125" officeooo:paragraph-rsid="00159125"/>
    </style:style>
    <style:style style:name="P3" style:family="paragraph" style:parent-style-name="Standard">
      <style:paragraph-properties style:writing-mode="lr-tb" style:writing-mode-automatic="false"/>
      <style:text-properties officeooo:rsid="00159125" officeooo:paragraph-rsid="00159125"/>
    </style:style>
    <style:style style:name="P4" style:family="paragraph" style:parent-style-name="Standard">
      <style:paragraph-properties style:writing-mode="lr-tb" style:writing-mode-automatic="false"/>
      <style:text-properties officeooo:rsid="0019e7d0" officeooo:paragraph-rsid="0019e7d0"/>
    </style:style>
    <style:style style:name="P5" style:family="paragraph">
      <style:paragraph-properties fo:text-align="center"/>
    </style:style>
    <style:style style:name="P6" style:family="paragraph" style:parent-style-name="Standard">
      <style:paragraph-properties fo:margin-top="0cm" fo:margin-bottom="0.499cm" style:contextual-spacing="false" style:writing-mode="lr-tb" style:writing-mode-automatic="false"/>
      <style:text-properties officeooo:rsid="0019e7d0" officeooo:paragraph-rsid="0019e7d0"/>
    </style:style>
    <style:style style:name="P7" style:family="paragraph" style:parent-style-name="Standard">
      <style:paragraph-properties fo:margin-top="0cm" fo:margin-bottom="0.499cm" style:contextual-spacing="false" style:writing-mode="lr-tb" style:writing-mode-automatic="false"/>
      <style:text-properties officeooo:rsid="001ada5d" officeooo:paragraph-rsid="001ada5d"/>
    </style:style>
    <style:style style:name="P8" style:family="paragraph" style:parent-style-name="Text_20_body">
      <style:text-properties officeooo:paragraph-rsid="001ada5d"/>
    </style:style>
    <style:style style:name="P9" style:family="paragraph" style:parent-style-name="Text_20_body">
      <style:text-properties officeooo:rsid="001ada5d"/>
    </style:style>
    <style:style style:name="P10" style:family="paragraph" style:parent-style-name="Standard">
      <style:paragraph-properties style:writing-mode="lr-tb" style:writing-mode-automatic="false"/>
      <style:text-properties officeooo:rsid="001ada5d" officeooo:paragraph-rsid="001ada5d"/>
    </style:style>
    <style:style style:name="P11" style:family="paragraph" style:parent-style-name="Text_20_body">
      <style:paragraph-properties style:writing-mode="lr-tb" style:writing-mode-automatic="false"/>
      <style:text-properties officeooo:rsid="001ada5d" officeooo:paragraph-rsid="001ada5d"/>
    </style:style>
    <style:style style:name="P12" style:family="paragraph" style:parent-style-name="Standard">
      <style:paragraph-properties style:writing-mode="lr-tb" style:writing-mode-automatic="false"/>
      <style:text-properties style:text-underline-style="none" officeooo:rsid="001ada5d" officeooo:paragraph-rsid="001ada5d"/>
    </style:style>
    <style:style style:name="P13" style:family="paragraph" style:parent-style-name="Standard">
      <style:paragraph-properties style:writing-mode="lr-tb" style:writing-mode-automatic="false"/>
      <style:text-properties style:text-underline-style="none" officeooo:rsid="001c3172" officeooo:paragraph-rsid="001c3172"/>
    </style:style>
    <style:style style:name="P14" style:family="paragraph" style:parent-style-name="Text_20_body">
      <style:paragraph-properties style:writing-mode="lr-tb" style:writing-mode-automatic="false"/>
      <style:text-properties style:text-underline-style="none" officeooo:rsid="001c3172" officeooo:paragraph-rsid="001c3172"/>
    </style:style>
    <style:style style:name="P15" style:family="paragraph" style:parent-style-name="Standard">
      <style:paragraph-properties style:writing-mode="lr-tb" style:writing-mode-automatic="false"/>
      <style:text-properties style:text-underline-style="none" officeooo:rsid="0021a376" officeooo:paragraph-rsid="0021a3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gable 2</text:p>
      <text:p text:style-name="P1"/>
      <text:p text:style-name="P1"/>
      <text:p text:style-name="P1">documentacion tecn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Arquitectura</text:p>
      <text:p text:style-name="P1"/>
      <text:p text:style-name="P1"/>
      <text:p text:style-name="P1">1.1 Topología de Contenedores</text:p>
      <text:p text:style-name="P1"/>
      <text:p text:style-name="P1">incus list</text:p>
      <text:p text:style-name="P1"/>
      <text:p text:style-name="P1"/>
      <text:p text:style-name="P1"><text:s/><draw:frame draw:style-name="fr1" draw:name="Imagen1" text:anchor-type="char" svg:width="17cm" svg:height="13.873cm" draw:z-index="0"><draw:image xlink:href="Pictures/100000010000038C000002E52B78C39F.png" xlink:type="simple" xlink:show="embed" xlink:actuate="onLoad" draw:mime-type="image/png"/></draw:frame><text:s/></text:p>
      <text:p text:style-name="P1">Se verificó el despliegue de los contenedores Incus que conforman la infraestructura IaaS del laboratorio. Cada contenedor cumple una función específica dentro de la arquitectura distribuida: autenticación centralizada con Keycloak, backend API con FastAPI y almacenamiento distribuido mediante CockroachDB.</text:p>
      <text:p text:style-name="P1"/>
      <text:p text:style-name="P1">1.2 Comunicación entre Contenedores</text:p>
      <text:p text:style-name="P1"/>
      <text:p text:style-name="P1">incus exec backend -- ping -c 3 10.68.32.149</text:p>
      <text:p text:style-name="P1"/>
      <text:p text:style-name="P1"/>
      <text:p text:style-name="P1"><draw:frame draw:style-name="fr2" draw:name="Imagen2" text:anchor-type="char" svg:width="17cm" svg:height="3.963cm" draw:z-index="1"><draw:image xlink:href="Pictures/1000000100000389000000D386BCAF19.png" xlink:type="simple" xlink:show="embed" xlink:actuate="onLoad" draw:mime-type="image/png"/></draw:frame><text:soft-page-break/><text:s/></text:p>
      <text:p text:style-name="P2">Se validó la conectividad de red entre los contenedores del laboratorio utilizando ICMP. El backend FastAPI logró comunicarse correctamente con el servidor Keycloak a través de la red virtual administrada por Incus.</text:p>
      <text:p text:style-name="P2"/>
      <text:p text:style-name="P1">1.3 Integración FastAPI y CockroachDB.</text:p>
      <text:p text:style-name="P1"/>
      <text:p text:style-name="P1">incus exec backend -- grep DATABASE_URL /opt/app/main.py</text:p>
      <text:p text:style-name="P1"/>
      <text:p text:style-name="P1"><draw:frame draw:style-name="fr2" draw:name="Imagen3" text:anchor-type="char" svg:width="17cm" svg:height="1.907cm" draw:z-index="2"><draw:image xlink:href="Pictures/10000001000003840000006517472B2E.png" xlink:type="simple" xlink:show="embed" xlink:actuate="onLoad" draw:mime-type="image/png"/></draw:frame><text:s/></text:p>
      <text:p text:style-name="P1">FastAPI utiliza SQLAlchemy junto con el driver sqlalchemy-cockroachdb para establecer comunicación con el clúster distribuido CockroachDB mediante la cadena de conexión DATABASE_URL.</text:p>
      <text:p text:style-name="P1"/>
      <text:p text:style-name="P1"/>
      <text:p text:style-name="P1"/>
      <text:p text:style-name="P1">2. Configuración de Keycloak:</text:p>
      <text:p text:style-name="P1"/>
      <text:p text:style-name="P1">2.1 Verificación del servicio Keycloak</text:p>
      <text:p text:style-name="P1"/>
      <text:p text:style-name="P1">incus exec keycloak-server -- docker ps</text:p>
      <text:p text:style-name="P1"/>
      <text:p text:style-name="P1"><draw:frame draw:style-name="fr2" draw:name="Imagen4" text:anchor-type="char" svg:width="17cm" svg:height="2.738cm" draw:z-index="3"><draw:image xlink:href="Pictures/1000000100000384000000918B4FD89C.png" xlink:type="simple" xlink:show="embed" xlink:actuate="onLoad" draw:mime-type="image/png"/></draw:frame><text:s/></text:p>
      <text:p text:style-name="P2">Se verificó la ejecución del contenedor Docker de Keycloak dentro del contenedor Incus keycloak-server. El servicio de autenticación se encuentra expuesto mediante el puerto 8080 para permitir el acceso a OpenID Connect y administración del realm.</text:p>
      <text:p text:style-name="P1"/>
      <text:p text:style-name="P1">2.2 Verificación del Realm.</text:p>
      <text:p text:style-name="P1"/>
      <text:p text:style-name="P3">curl <text:a xlink:type="simple" xlink:href="http://10.68.32.149:8080/realms/labRealm" text:style-name="Internet_20_link" text:visited-style-name="Visited_20_Internet_20_Link">http://10.68.32.149:8080/realms/labRealm</text:a></text:p>
      <text:p text:style-name="P3"/>
      <text:p text:style-name="P3"/>
      <text:p text:style-name="P3"><draw:frame draw:style-name="fr1" draw:name="Imagen5" text:anchor-type="char" svg:width="17cm" svg:height="4.249cm" draw:z-index="4"><draw:image xlink:href="Pictures/1000000100000390000000E45379E88B.png" xlink:type="simple" xlink:show="embed" xlink:actuate="onLoad" draw:mime-type="image/png"/></draw:frame><text:soft-page-break/><text:s/></text:p>
      <text:p text:style-name="P3">Se verificó la disponibilidad del realm labRealm mediante una solicitud HTTP directa al endpoint OpenID Connect de Keycloak. La respuesta JSON confirmó la existencia del realm y la disponibilidad de los servicios de autenticación y emisión de tokens JWT.</text:p>
      <text:p text:style-name="P3"/>
      <text:p text:style-name="P4">2.3 Generación de JWT</text:p>
      <text:p text:style-name="P4"/>
      <text:p text:style-name="P4">curl -X POST http://10.68.32.149:8080/realms/labRealm/protocol/openid-connect/token \</text:p>
      <text:p text:style-name="P4">-H "Content-Type: application/x-www-form-urlencoded" \</text:p>
      <text:p text:style-name="P4">-d "client_id=lab-client" \</text:p>
      <text:p text:style-name="P4">-d "client_secret=CnR8WwjCY4Jx3qCALOJJj7dff3LrMYWG" \</text:p>
      <text:p text:style-name="P4">-d "username=testuser" \</text:p>
      <text:p text:style-name="P4">-d "password=test123" \</text:p>
      <text:p text:style-name="P4">-d "grant_type=password"</text:p>
      <text:p text:style-name="P4"/>
      <text:p text:style-name="P4"/>
      <text:p text:style-name="P4"/>
      <text:p text:style-name="P4"><draw:line text:anchor-type="paragraph" draw:z-index="6" draw:name="Línea 1" draw:style-name="gr1" draw:text-style-name="P5" svg:x1="3.776cm" svg:y1="13.384cm" svg:x2="4.887cm" svg:y2="13.358cm"><text:p/></draw:line><draw:line text:anchor-type="paragraph" draw:z-index="7" draw:name="Línea 2" draw:style-name="gr1" draw:text-style-name="P5" svg:x1="0.443cm" svg:y1="3.621cm" svg:x2="2.718cm" svg:y2="3.595cm"><text:p/></draw:line><draw:line text:anchor-type="paragraph" draw:z-index="8" draw:name="Línea 3" draw:style-name="gr1" draw:text-style-name="P5" svg:x1="4.253cm" svg:y1="13.358cm" svg:x2="4.385cm" svg:y2="13.384cm"><text:p/></draw:line><draw:frame draw:style-name="fr2" draw:name="Imagen7" text:anchor-type="char" svg:width="17cm" svg:height="13.929cm" draw:z-index="5"><draw:image xlink:href="Pictures/1000000100000381000002DFBCC1F312.png" xlink:type="simple" xlink:show="embed" xlink:actuate="onLoad" draw:mime-type="image/png"/></draw:frame><text:soft-page-break/><text:s/></text:p>
      <text:p text:style-name="P4">Se realizó una autenticación mediante el flujo OAuth2 Password Grant de Keycloak. El servidor respondió correctamente generando un token JWT Bearer firmado con RS256 para el usuario autenticado.</text:p>
      <text:p text:style-name="P4"/>
      <text:p text:style-name="P4">2.4 Validación de autenticación Bearer</text:p>
      <text:p text:style-name="P6"/>
      <text:p text:style-name="P7">Guardar token;</text:p>
      <text:p text:style-name="P8">TOKEN=$(curl -s -X POST http://10.68.32.149:8080/realms/labRealm/protocol/openid-connect/token <text:line-break/>-H "Content-Type: application/x-www-form-urlencoded" <text:line-break/>-d "client_id=lab-client" <text:line-break/>-d "client_secret=CnR8WwjCY4Jx3qCALOJJj7dff3LrMYWG" <text:line-break/>-d "username=testuser" <text:line-break/>-d "password=test123" <text:line-break/>-d "grant_type=password" | python3 -c "import sys, json; print(json.load(sys.stdin)['access_token'])")</text:p>
      <text:p text:style-name="Text_20_body"/>
      <text:p text:style-name="P9"/>
      <text:p text:style-name="P10"><text:soft-page-break/>luego:</text:p>
      <text:p text:style-name="P10"/>
      <text:p text:style-name="P10">curl -H "Authorization: Bearer $TOKEN" <text:a xlink:type="simple" xlink:href="http://10.68.32.170:8000/items" text:style-name="Internet_20_link" text:visited-style-name="Visited_20_Internet_20_Link">http://10.68.32.170:8000/items</text:a></text:p>
      <text:p text:style-name="P10"/>
      <text:p text:style-name="P10"><draw:frame draw:style-name="fr2" draw:name="Imagen6" text:anchor-type="char" svg:width="17cm" svg:height="6.856cm" draw:z-index="9"><draw:image xlink:href="Pictures/10000001000003840000016BEF4EC68C.png" xlink:type="simple" xlink:show="embed" xlink:actuate="onLoad" draw:mime-type="image/png"/></draw:frame><text:s/></text:p>
      <text:p text:style-name="P10">Se realizó una solicitud autenticada utilizando un Bearer Token JWT emitido por Keycloak. FastAPI validó correctamente el token RS256 y permitió el acceso al endpoint protegido /items, retornando registros almacenados en CockroachDB.</text:p>
      <text:p text:style-name="P10"/>
      <text:p text:style-name="P10">2.5 Validación RS256 y JWKS</text:p>
      <text:p text:style-name="P10"/>
      <text:p text:style-name="P10">curl <text:a xlink:type="simple" xlink:href="http://10.68.32.149:8080/realms/labRealm/protocol/openid-connect/certs" text:style-name="Internet_20_link" text:visited-style-name="Visited_20_Internet_20_Link">http://10.68.32.149:8080/realms/labRealm/protocol/openid-connect/certs</text:a></text:p>
      <text:p text:style-name="P10"/>
      <text:p text:style-name="P10"/>
      <text:p text:style-name="P10"/>
      <text:p text:style-name="P10"><draw:line text:anchor-type="paragraph" draw:z-index="11" draw:name="Línea horizontal 1" draw:style-name="gr2" draw:text-style-name="P5" svg:x1="0.522cm" svg:y1="1.208cm" svg:x2="1.475cm" svg:y2="1.208cm"><text:p/></draw:line><draw:frame draw:style-name="fr1" draw:name="Imagen8" text:anchor-type="char" svg:width="17cm" svg:height="14.834cm" draw:z-index="10"><draw:image xlink:href="Pictures/10000001000003870000031421372E1D.png" xlink:type="simple" xlink:show="embed" xlink:actuate="onLoad" draw:mime-type="image/png"/></draw:frame><text:soft-page-break/><text:s/></text:p>
      <text:p text:style-name="P11">Se verificó el endpoint JWKS de Keycloak utilizado para publicar las claves públicas RSA empleadas en la validación de tokens JWT firmados con RS256.</text:p>
      <text:p text:style-name="P12"/>
      <text:p text:style-name="P13">3. Configuración de FastAPI</text:p>
      <text:p text:style-name="P13"/>
      <text:p text:style-name="P13">3.1 Verificación del servicio FastAPI</text:p>
      <text:p text:style-name="P13"/>
      <text:p text:style-name="P13"/>
      <text:p text:style-name="P13">incus exec backend -- systemctl status fastapi</text:p>
      <text:p text:style-name="P13"><draw:frame draw:style-name="fr1" draw:name="Imagen9" text:anchor-type="char" svg:width="17cm" svg:height="7.906cm" draw:z-index="12"><draw:image xlink:href="Pictures/1000000100000394000001AAE62A2C18.png" xlink:type="simple" xlink:show="embed" xlink:actuate="onLoad" draw:mime-type="image/png"/></draw:frame><text:soft-page-break/><text:s/></text:p>
      <text:p text:style-name="P14">Se verificó el estado del servicio FastAPI administrado mediante systemd dentro del contenedor backend.</text:p>
      <text:p text:style-name="P14"/>
      <text:p text:style-name="P13">3.2 Verificación del endpoint principal</text:p>
      <text:p text:style-name="P13"/>
      <text:p text:style-name="P13">curl http://10.68.32.170:8000/</text:p>
      <text:p text:style-name="P13"/>
      <text:p text:style-name="P13"><draw:frame draw:style-name="fr2" draw:name="Imagen10" text:anchor-type="char" svg:width="17cm" svg:height="1.362cm" draw:z-index="13"><draw:image xlink:href="Pictures/100000010000038F000000499D5F71B2.png" xlink:type="simple" xlink:show="embed" xlink:actuate="onLoad" draw:mime-type="image/png"/></draw:frame><text:s/></text:p>
      <text:p text:style-name="P14">Se validó el funcionamiento del endpoint principal de FastAPI mediante una solicitud HTTP directa al backend.</text:p>
      <text:p text:style-name="P14"/>
      <text:p text:style-name="P13">3.3 Swagger UI</text:p>
      <text:p text:style-name="P13"/>
      <text:p text:style-name="P13">url;http://10.68.32.170:8000/docs</text:p>
      <text:p text:style-name="P13"><draw:frame draw:style-name="fr1" draw:name="Imagen11" text:anchor-type="char" svg:width="17cm" svg:height="10.624cm" draw:z-index="14"><draw:image xlink:href="Pictures/1000000100000780000004B01AE21033.png" xlink:type="simple" xlink:show="embed" xlink:actuate="onLoad" draw:mime-type="image/png"/></draw:frame><text:soft-page-break/><text:s/></text:p>
      <text:p text:style-name="P14">FastAPI genera automáticamente documentación interactiva Swagger UI para visualizar y probar los endpoints de la API REST.</text:p>
      <text:p text:style-name="P13"><text:s/></text:p>
      <text:p text:style-name="P13">3.4 CRUD protegido con Bearer Token</text:p>
      <text:p text:style-name="P13"/>
      <text:p text:style-name="P13">curl -H "Authorization: Bearer $TOKEN" http://10.68.32.170:8000/items</text:p>
      <text:p text:style-name="P13"/>
      <text:p text:style-name="P13"><draw:frame draw:style-name="fr1" draw:name="Imagen12" text:anchor-type="char" svg:width="17cm" svg:height="3.127cm" draw:z-index="15"><draw:image xlink:href="Pictures/1000000100000391000000A837C1486E.png" xlink:type="simple" xlink:show="embed" xlink:actuate="onLoad" draw:mime-type="image/png"/></draw:frame><text:s/></text:p>
      <text:p text:style-name="P14">Se verificó el acceso autenticado a los endpoints protegidos de FastAPI utilizando Bearer Token JWT emitido por Keycloak.</text:p>
      <text:p text:style-name="P13"/>
      <text:p text:style-name="P13">3.5 Creación de registros en FastAPI</text:p>
      <text:p text:style-name="P13"/>
      <text:p text:style-name="P13">curl -X POST http://10.68.32.170:8000/items \</text:p>
      <text:p text:style-name="P13">-H "Authorization: Bearer $TOKEN" \</text:p>
      <text:p text:style-name="P13">-H "Content-Type: application/json" \</text:p>
      <text:p text:style-name="P13">-d '{"name":"Item prueba","description":"Prueba CRUD"}'</text:p>
      <text:p text:style-name="P13"/>
      <text:p text:style-name="P13"><draw:frame draw:style-name="fr2" draw:name="Imagen13" text:anchor-type="char" svg:width="17cm" svg:height="3.127cm" draw:z-index="16"><draw:image xlink:href="Pictures/1000000100000391000000A8E9BC258F.png" xlink:type="simple" xlink:show="embed" xlink:actuate="onLoad" draw:mime-type="image/png"/></draw:frame><text:soft-page-break/><text:s/></text:p>
      <text:p text:style-name="P14">Se realizó una operación CRUD autenticada sobre FastAPI, insertando registros en CockroachDB mediante endpoints protegidos con JWT.</text:p>
      <text:p text:style-name="P13"/>
      <text:p text:style-name="P13"/>
      <text:p text:style-name="P13">4. Configuración de CockroachDB</text:p>
      <text:p text:style-name="P13"/>
      <text:p text:style-name="P13">incus exec db-node1 – bash</text:p>
      <text:p text:style-name="P13">cockroach node status --insecure --host=10.68.32.4:26257</text:p>
      <text:p text:style-name="P13"/>
      <text:p text:style-name="P13"><draw:frame draw:style-name="fr1" draw:name="Imagen14" text:anchor-type="char" svg:width="17cm" svg:height="6.126cm" draw:z-index="17"><draw:image xlink:href="Pictures/100000010000038E00000148FE8C5147.png" xlink:type="simple" xlink:show="embed" xlink:actuate="onLoad" draw:mime-type="image/png"/></draw:frame><text:s/></text:p>
      <text:p text:style-name="P13">Se verificó el estado del clúster distribuido CockroachDB mediante el comando cockroach node status, confirmando la disponibilidad y comunicación entre los tres nodos del sistema.</text:p>
      <text:p text:style-name="P13"/>
      <text:p text:style-name="P13"/>
      <text:p text:style-name="P13">4.2 Bases de datos configuradas</text:p>
      <text:p text:style-name="P13"/>
      <text:p text:style-name="P13">SHOW DATABASES;</text:p>
      <text:p text:style-name="P13"><text:s/></text:p>
      <text:p text:style-name="P13"/>
      <text:p text:style-name="P13"/>
      <text:p text:style-name="P13"><draw:frame draw:style-name="fr1" draw:name="Imagen16" text:anchor-type="char" svg:width="17cm" svg:height="6.126cm" draw:z-index="18"><draw:image xlink:href="Pictures/100000010000038E000001489238327B.png" xlink:type="simple" xlink:show="embed" xlink:actuate="onLoad" draw:mime-type="image/png"/></draw:frame><text:soft-page-break/><text:s/></text:p>
      <text:p text:style-name="P13">Se verificó la existencia de las bases de datos del clúster CockroachDB. La base de datos appdb es utilizada por FastAPI para almacenar la información del sistema.</text:p>
      <text:p text:style-name="P13"/>
      <text:p text:style-name="P13">4.3 Tablas del sistema</text:p>
      <text:p text:style-name="P13"/>
      <text:p text:style-name="P13">USE appdb;</text:p>
      <text:p text:style-name="P13">SHOW TABLES;</text:p>
      <text:p text:style-name="P13"/>
      <text:p text:style-name="P13"><draw:frame draw:style-name="fr1" draw:name="Imagen15" text:anchor-type="char" svg:width="17cm" svg:height="6.126cm" draw:z-index="19"><draw:image xlink:href="Pictures/100000010000038E000001488EDFC777.png" xlink:type="simple" xlink:show="embed" xlink:actuate="onLoad" draw:mime-type="image/png"/></draw:frame><text:s/></text:p>
      <text:p text:style-name="P13">La tabla items fue creada automáticamente mediante SQLAlchemy desde FastAPI para almacenar los registros de la aplicación.</text:p>
      <text:p text:style-name="P13"/>
      <text:p text:style-name="P13">4.5 Integración FastAPI y CockroachDB</text:p>
      <text:p text:style-name="P13"/>
      <text:p text:style-name="P13">incus exec backend -- grep DATABASE_URL /opt/app/main.py</text:p>
      <text:p text:style-name="P13"/>
      <text:p text:style-name="P13"><draw:frame draw:style-name="fr2" draw:name="Imagen17" text:anchor-type="char" svg:width="17cm" svg:height="2.764cm" draw:z-index="20"><draw:image xlink:href="Pictures/100000010000038E00000094EC46B93C.png" xlink:type="simple" xlink:show="embed" xlink:actuate="onLoad" draw:mime-type="image/png"/></draw:frame><text:s/></text:p>
      <text:p text:style-name="P13">FastAPI utiliza SQLAlchemy junto con el driver sqlalchemy-cockroachdb para conectarse al clúster distribuido CockroachDB mediante la variable DATABASE_URL.</text:p>
      <text:p text:style-name="P13"/>
      <text:p text:style-name="P13"><text:soft-page-break/></text:p>
      <text:p text:style-name="P13">5. Scripts utilizados</text:p>
      <text:p text:style-name="P13"/>
      <text:p text:style-name="P13">5.1 Scripts de Incus</text:p>
      <text:p text:style-name="P13"/>
      <text:p text:style-name="P13"><draw:frame draw:style-name="fr1" draw:name="Imagen18" text:anchor-type="char" svg:width="17cm" svg:height="14.603cm" draw:z-index="21"><draw:image xlink:href="Pictures/100000010000038C0000030CE62E197B.png" xlink:type="simple" xlink:show="embed" xlink:actuate="onLoad" draw:mime-type="image/png"/></draw:frame><text:s/></text:p>
      <text:p text:style-name="P13">El comando incus list permitió verificar el estado, dirección IP y disponibilidad de los contenedores desplegados en la infraestructura.</text:p>
      <text:p text:style-name="P13"/>
      <text:p text:style-name="P13">incus exec backend -- bash</text:p>
      <text:p text:style-name="P13"/>
      <text:p text:style-name="P13"><draw:frame draw:style-name="fr2" draw:name="Imagen19" text:anchor-type="char" svg:width="17cm" svg:height="0.894cm" draw:z-index="22"><draw:image xlink:href="Pictures/10000001000003B600000032B4B650D9.png" xlink:type="simple" xlink:show="embed" xlink:actuate="onLoad" draw:mime-type="image/png"/></draw:frame><text:s text:c="2"/></text:p>
      <text:p text:style-name="P13">El comando incus exec fue utilizado para acceder y administrar los servicios internos del contenedor backend.</text:p>
      <text:p text:style-name="P13"/>
      <text:p text:style-name="P13">5.2 Scripts de Keycloak</text:p>
      <text:p text:style-name="P13"/>
      <text:p text:style-name="P13">incus exec keycloak-server -- docker start keycloak</text:p>
      <text:p text:style-name="P13"><draw:frame draw:style-name="fr2" draw:name="Imagen20" text:anchor-type="char" svg:width="17cm" svg:height="1.55cm" draw:z-index="23"><draw:image xlink:href="Pictures/100000010000037800000051B7AC4867.png" xlink:type="simple" xlink:show="embed" xlink:actuate="onLoad" draw:mime-type="image/png"/></draw:frame><text:soft-page-break/><text:s/></text:p>
      <text:p text:style-name="P13">El contenedor Docker de Keycloak fue iniciado desde el contenedor keycloak-server utilizando Docker.</text:p>
      <text:p text:style-name="P13"/>
      <text:p text:style-name="P13">curl http://10.68.32.149:8080/realms/labRealm</text:p>
      <text:p text:style-name="P13"/>
      <text:p text:style-name="P13"><draw:frame draw:style-name="fr2" draw:name="Imagen21" text:anchor-type="char" svg:width="17cm" svg:height="4.039cm" draw:z-index="24"><draw:image xlink:href="Pictures/1000000100000378000000D34345A70C.png" xlink:type="simple" xlink:show="embed" xlink:actuate="onLoad" draw:mime-type="image/png"/></draw:frame><text:s/></text:p>
      <text:p text:style-name="P13">Se validó el funcionamiento del realm labRealm mediante una solicitud HTTP utilizando curl.</text:p>
      <text:p text:style-name="P13"/>
      <text:p text:style-name="P13">5.3 Scripts de FastAPI</text:p>
      <text:p text:style-name="P13"/>
      <text:p text:style-name="P13">incus exec backend -- systemctl status fastapi</text:p>
      <text:p text:style-name="P13"><draw:frame draw:style-name="fr1" draw:name="Imagen22" text:anchor-type="char" svg:width="17cm" svg:height="13.04cm" draw:z-index="25"><draw:image xlink:href="Pictures/100000010000037D000002AD6D584F8A.png" xlink:type="simple" xlink:show="embed" xlink:actuate="onLoad" draw:mime-type="image/png"/></draw:frame>El servicio FastAPI fue administrado mediante systemd para garantizar persistencia y reinicio automático.</text:p>
      <text:p text:style-name="P13"><text:soft-page-break/>curl <text:a xlink:type="simple" xlink:href="http://10.68.32.170:8000/" text:style-name="Internet_20_link" text:visited-style-name="Visited_20_Internet_20_Link">http://10.68.32.170:8000/</text:a></text:p>
      <text:p text:style-name="P13"/>
      <text:p text:style-name="P13"><draw:frame draw:style-name="fr2" draw:name="Imagen23" text:anchor-type="char" svg:width="17cm" svg:height="1.009cm" draw:z-index="26"><draw:image xlink:href="Pictures/100000010000037C000000356465D64D.png" xlink:type="simple" xlink:show="embed" xlink:actuate="onLoad" draw:mime-type="image/png"/></draw:frame>Se validó la disponibilidad de la API REST mediante solicitudes HTTP utilizando curl. </text:p>
      <text:p text:style-name="P13"/>
      <text:p text:style-name="P13"/>
      <text:p text:style-name="P13">5.4 Scripts de CockroachDB</text:p>
      <text:p text:style-name="P13"/>
      <text:p text:style-name="P13">cockroach node status --insecure –host=10.68.32.4:26257</text:p>
      <text:p text:style-name="P13"/>
      <text:p text:style-name="P13"><draw:frame draw:style-name="fr1" draw:name="Imagen24" text:anchor-type="char" svg:width="17cm" svg:height="6.036cm" draw:z-index="27"><draw:image xlink:href="Pictures/10000001000003770000013B6F237988.png" xlink:type="simple" xlink:show="embed" xlink:actuate="onLoad" draw:mime-type="image/png"/></draw:frame></text:p>
      <text:p text:style-name="P13"><text:s/></text:p>
      <text:p text:style-name="P15">El comando cockroach node status permitió verificar el estado y disponibilidad del clúster distribuido CockroachDB.</text:p>
      <text:p text:style-name="P15"/>
      <text:p text:style-name="P15"/>
      <text:p text:style-name="P15"/>
      <text:p text:style-name="P15">5.5 Scripts de pruebas y validación</text:p>
      <text:p text:style-name="P15"/>
      <text:p text:style-name="P15"/>
      <text:p text:style-name="P15"><draw:frame draw:style-name="fr2" draw:name="Imagen25" text:anchor-type="char" svg:width="17cm" svg:height="4.695cm" draw:z-index="28"><draw:image xlink:href="Pictures/1000000100000377000000F59D875FEA.png" xlink:type="simple" xlink:show="embed" xlink:actuate="onLoad" draw:mime-type="image/png"/></draw:frame><text:s/></text:p>
      <text:p text:style-name="P15">Se generó un token JWT válido desde Keycloak utilizando OpenID Connec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url -H "Authorization: Bearer $TOKEN" <text:a xlink:type="simple" xlink:href="http://10.68.32.170:8000/items" text:style-name="Internet_20_link" text:visited-style-name="Visited_20_Internet_20_Link">http://10.68.32.170:8000/items</text:a> </text:p>
      <text:p text:style-name="P15"><draw:frame draw:style-name="fr2" draw:name="Imagen26" text:anchor-type="char" svg:width="17cm" svg:height="3.775cm" draw:z-index="29"><draw:image xlink:href="Pictures/1000000100000377000000C5546D661F.png" xlink:type="simple" xlink:show="embed" xlink:actuate="onLoad" draw:mime-type="image/png"/></draw:frame><text:s/></text:p>
      <text:p text:style-name="P15">Se validó el acceso a endpoints protegidos utilizando autenticación Bearer con JWT.</text:p>
      <text:p text:style-name="P15"/>
      <text:p text:style-name="P15"/>
      <text:p text:style-name="P15">curl -X POST http://10.68.32.170:8000/items \</text:p>
      <text:p text:style-name="P15">-H "Authorization: Bearer $TOKEN" \</text:p>
      <text:p text:style-name="P15">-H 'Content-Type: application/json' \</text:p>
      <text:p text:style-name="P15">-d '{"name":"Item prueba","description":"Prueba CRUD"}'</text:p>
      <text:p text:style-name="P15"><draw:frame draw:style-name="fr2" draw:name="Imagen27" text:anchor-type="char" svg:width="17cm" svg:height="5.634cm" draw:z-index="30"><draw:image xlink:href="Pictures/100000010000038C0000012DB2A4AB0F.png" xlink:type="simple" xlink:show="embed" xlink:actuate="onLoad" draw:mime-type="image/png"/></draw:frame><text:s/></text:p>
      <text:p text:style-name="P15">Se realizaron pruebas CRUD autenticadas sobre la API REST para validar la integración entre FastAPI y CockroachDB.</text:p>
      <text:p text:style-name="P15"/>
      <text:p text:style-name="P15">6. Conclusiones</text:p>
      <text:p text:style-name="P15"/>
      <text:p text:style-name="P15">El laboratorio permitió implementar una infraestructura IaaS funcional utilizando contenedores Incus para separar y administrar los distintos servicios del sistema.</text:p>
      <text:p text:style-name="P15"/>
      <text:p text:style-name="P15">La integración entre Keycloak, FastAPI y CockroachDB permitió validar un flujo completo de autenticación mediante JWT utilizando el algoritmo RS256 y OpenID Connect.</text:p>
      <text:p text:style-name="P15"/>
      <text:p text:style-name="P15">FastAPI facilitó la creación de endpoints REST protegidos, documentación automática mediante Swagger UI y operaciones CRUD autenticadas utilizando Bearer Token.</text:p>
      <text:p text:style-name="P15"/>
      <text:p text:style-name="P15">CockroachDB permitió implementar una base de datos distribuida compuesta por múltiples nodos, validando conceptos de replicación, disponibilidad y persistencia de datos dentro del clúster.</text:p>
      <text:p text:style-name="P15"/>
      <text:p text:style-name="P15">El uso de comandos administrativos y pruebas mediante curl permitió comprobar la comunicación entre servicios, el funcionamiento de la autenticación y la persistencia de información en la base de datos.</text:p>
      <text:p text:style-name="P15"/>
      <text:p text:style-name="P15">La práctica permitió comprender la integración de tecnologías modernas orientadas a arquitecturas distribuidas, autenticación centralizada y despliegue de servicios en contenedo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23:22:19.490251934</meta:creation-date>
    <dc:date>2026-05-29T00:30:00.712772106</dc:date>
    <meta:editing-duration>PT26M50S</meta:editing-duration>
    <meta:editing-cycles>3</meta:editing-cycles>
    <meta:generator>LibreOffice/26.2.2.2$Linux_X86_64 LibreOffice_project/620$Build-2</meta:generator>
    <meta:document-statistic meta:table-count="0" meta:image-count="27" meta:object-count="0" meta:page-count="15" meta:paragraph-count="131" meta:word-count="1016" meta:character-count="7933" meta:non-whitespace-character-count="6986"/>
  </office:meta>
</office:document-meta>
</file>